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MU Serif" svg:font-family="CMU Serif" style:font-family-generic="system" style:font-pitch="variable" svg:panose-1="2 0 6 3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MU Serif" style:font-name-complex="CMU Serif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CMU Serif" style:font-name-complex="CMU Serif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7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2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Fuentedepárrafopredeter." style:family="text">
      <style:text-properties fo:font-style="italic" style:font-style-asian="italic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style="italic" style:font-style-asian="italic"/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0" style:parent-style-name="Párrafodelista" style:family="paragraph"/>
    <style:style style:name="P31" style:parent-style-name="Párrafodelista" style:family="paragraph"/>
    <style:style style:name="P3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fo:font-size="15pt" style:font-size-asian="15pt" style:font-size-complex="15pt"/>
    </style:style>
    <style:style style:name="T61" style:parent-style-name="Fuentedepárrafopredeter.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ISTEMA EXPERTO DE</text:p>
      <text:p text:style-name="P2">CLASIFICACIÓN DE ENFERMEDADES</text:p>
      <text:p text:style-name="P3"/>
      <text:p text:style-name="P4"/>
      <text:p text:style-name="P5"><text:span text:style-name="T6"><draw:frame draw:z-index="251658240" draw:style-name="a0" draw:name="Imagen 1" text:anchor-type="paragraph" svg:x="0in" svg:y="0.54097in" svg:width="4.73681in" svg:height="4.26042in" style:rel-width="scale" style:rel-height="scale"><draw:image xlink:href="media/image1.png" xlink:type="simple" xlink:show="embed" xlink:actuate="onLoad"/><svg:title/><svg:desc>C:\Users\rexus\Desktop\Venn-diagram-demonstrating-chronic-kidney-disease-of-nontraditional-etiology-CKDnT.png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alizado por:</text:p>
      <text:p text:style-name="P20">Francisco Javier Molina Prieto – 49509131K (Representante)</text:p>
      <text:p text:style-name="P21">Álvaro Prieto Barón - 49506913B</text:p>
      <text:soft-page-break/>
      <text:h text:style-name="Título1" text:outline-level="1">Descripción del problema</text:h>
      <text:p text:style-name="Normal"/>
      <text:p text:style-name="Normal">La medicina, a pesar de ser un campo muy amplío, puede ser un campo clasificado si se tiene una base de datos consistente y un Sistema que se ayude de esta base de datos para sacar conclusiones sobre, por ejemplo, qué enfermedad padece un paciente. Este sistema debe indicar el nombre de la enfermedad o enfermedades que más se acercan al objetivo dados<text:s/></text:p>
      <text:p text:style-name="Normal">dados los síntomas de un enfermo.</text:p>
      <text:p text:style-name="P22"/>
      <text:h text:style-name="Título1" text:outline-level="1">Análisis del problema</text:h>
      <text:p text:style-name="Normal"/>
      <text:p text:style-name="Normal">Para realizar este Sistema, necesitaríamos una base de datos de enfermedades y sus síntomas<text:s/>diferenciadores o menos comunes. Consideraremos pues al menos un número de síntomas aproximado a 4 y unas 15-20 enfermedades.</text:p>
      <text:p text:style-name="Normal"/>
      <text:p text:style-name="Normal">Tomaremos pues estos datos y los introduciremos en nuestro sistema, que tendrá la siguiente estructura:</text:p>
      <text:p text:style-name="Normal">Plantilla enfermedad, con 4 slots: nombre, síntomas (multislot), número de síntomas confirmados y probabilidad de enfermedad.</text:p>
      <text:p text:style-name="Normal">Base de datos de enfermedades (hechos).</text:p>
      <text:p text:style-name="P23"/>
      <text:h text:style-name="Título1" text:outline-level="1">Funcionamiento del sistema</text:h>
      <text:p text:style-name="Normal"/>
      <text:p text:style-name="Normal">El sistema aceptará como entrada los síntomas del paciente y tendrá como salida las 3 enfermedades más probables que puede padecer este.<text:line-break/>Cada síntoma introducido, se “confirmará” (<text:span text:style-name="T24">slot</text:span><text:s/><text:span text:style-name="T25">numconfirmed</text:span><text:s/>de la<text:span text:style-name="T26"><text:s/>template</text:span><text:s/><text:span text:style-name="T27">disease</text:span>).</text:p>
      <text:p text:style-name="Normal"/>
      <text:p text:style-name="Normal">Una vez introducidos todos los síntomas, se comprobará el total de síntomas confirmados de cada enfermedad (con la longitud del<text:s/><text:span text:style-name="T28">slot</text:span><text:s/>antes mencionado) y se dividirá entre el número total de síntomas de esta, obteniendo así la probabilidad de que esta sea la enfermedad que padece el paciente.</text:p>
      <text:p text:style-name="Normal"/>
      <text:p text:style-name="Normal">Este sistema tiene este funcionamiento debido a que no todas las enfermedades tienen síntomas únicos o el mismo número total de síntomas, por lo que es el modo más preciso para clasificarlas.</text:p>
      <text:p text:style-name="Normal"/>
      <text:p text:style-name="P29"/>
      <text:soft-page-break/>
      <text:h text:style-name="Título1" text:outline-level="1">Manual de uso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Equipo de desarrollo</text:h>
      <text:p text:style-name="Normal"/>
      <text:p text:style-name="Normal">El equipo está formado por:</text:p>
      <text:list text:style-name="LFO4" text:continue-numbering="true">
        <text:list-item>
          <text:p text:style-name="P30">Álvaro Prieto Barón: Encargado del backend y la analítica del sistema. Iniciador de la idea<text:s/>del funcionamiento del sistema para el análisis estadístico de enfermedades.</text:p>
        </text:list-item>
        <text:list-item>
          <text:p text:style-name="P31">Fco. Javier Molina Prieto: Encargado de la base de datos del sistema y de la documentación<text:s/>de este.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Formato:<text:s/></text:span><text:span text:style-name="T61">&lt;Apellido1a_Apellido2a_y_Apellido1b_Apellido2b&gt;_final.zi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MU Serif" svg:font-family="CMU Serif" style:font-family-generic="system" style:font-pitch="variable" svg:panose-1="2 0 6 3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Normal" style:default-outline-level="1">
      <style:text-properties style:font-name="CMU Serif" style:font-name-complex="CMU Serif" fo:font-size="20pt" style:font-size-asian="20pt" style:font-size-complex="15pt" fo:hyphenate="false"/>
    </style:style>
    <style:style style:name="Normal" style:display-name="Normal" style:family="paragraph">
      <style:text-properties style:font-name="CMU Serif" style:font-name-complex="CMU Serif" fo:font-size="14pt" style:font-size-asian="14pt" style:font-size-complex="15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MU Serif" style:font-name-complex="CMU Serif" fo:font-size="20pt" style:font-size-asian="20pt" style:font-size-complex="1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3LVL1" style:family="text">
      <style:text-properties style:font-name="CMU Serif" style:font-name-asian="NSimSun" style:font-name-complex="CMU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MU Serif" style:font-name-asian="NSimSun" style:font-name-complex="CMU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is Molina</dc:creator>
    <meta:creation-date>2019-05-08T13:47:00Z</meta:creation-date>
    <dc:date>2019-05-08T12:34:00Z</dc:date>
    <meta:template xlink:href="Normal.dotm" xlink:type="simple"/>
    <meta:editing-cycles>5</meta:editing-cycles>
    <meta:editing-duration>PT2100S</meta:editing-duration>
    <meta:document-statistic meta:page-count="4" meta:paragraph-count="4" meta:word-count="350" meta:character-count="2273" meta:row-count="16" meta:non-whitespace-character-count="1927"/>
  </office:meta>
</office:document-meta>
</file>